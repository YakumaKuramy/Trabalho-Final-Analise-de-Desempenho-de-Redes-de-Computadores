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Análise de Desempenho de Protocolos de Transporte (TCP vs UDP) sob Perda de Pacotes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bordagem Sistemática e Planejamento do Experimento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6T00:14:54.015729700</meta:creation-date>
    <meta:generator>LibreOffice/25.8.6.2$Windows_X86_64 LibreOffice_project/b4b39682cd9868fa725bc664aff94278d315bd04</meta:generator>
    <dc:date>2026-05-26T00:18:26.624452000</dc:date>
    <meta:editing-duration>PT3M35S</meta:editing-duration>
    <meta:editing-cycles>1</meta:editing-cycles>
    <meta:document-statistic meta:object-count="25"/>
  </office:meta>
</office:document-meta>
</file>